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bucket.appilix.com/app-apk-db9c6cc4c57346198f179a949ead8309-1782917379.apk" text:style-name="Internet_20_link" text:visited-style-name="Visited_20_Internet_20_Link">https://bucket.appilix.com/app-apk-db9c6cc4c57346198f179a949ead8309-1782917379.apk</text:a><text:line-break/><text:line-break/><text:line-break/><text:line-break/><text:a xlink:type="simple" xlink:href="https://bucket.appilix.com/app-aab-0d425068ed074b1fa9473774dfdac818-1782917384.aab" text:style-name="Internet_20_link" text:visited-style-name="Visited_20_Internet_20_Link">https://bucket.appilix.com/app-aab-0d425068ed074b1fa9473774dfdac818-1782917384.aab</text:a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10:56:33.052885659</meta:creation-date>
    <dc:date>2026-07-01T10:57:28.357098499</dc:date>
    <meta:editing-duration>PT55S</meta:editing-duration>
    <meta:editing-cycles>2</meta:editing-cycles>
    <meta:generator>LibreOffice/26.2.3.2$Linux_X86_64 LibreOffice_project/620$Build-2</meta:generator>
    <meta:document-statistic meta:table-count="0" meta:image-count="0" meta:object-count="0" meta:page-count="1" meta:paragraph-count="1" meta:word-count="2" meta:character-count="170" meta:non-whitespace-character-count="164"/>
  </office:meta>
</office:document-meta>
</file>